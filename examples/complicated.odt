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6000000BA60214A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StarSymbol" svg:font-family="StarSymbol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6.562cm" style:rel-column-width="25297*"/>
    </style:style>
    <style:style style:name="Table1.B" style:family="table-column">
      <style:table-column-properties style:column-width="2.729cm" style:rel-column-width="10520*"/>
    </style:style>
    <style:style style:name="Table1.C" style:family="table-column">
      <style:table-column-properties style:column-width="2.039cm" style:rel-column-width="7861*"/>
    </style:style>
    <style:style style:name="Table1.D" style:family="table-column">
      <style:table-column-properties style:column-width="3.115cm" style:rel-column-width="12009*"/>
    </style:style>
    <style:style style:name="Table1.E" style:family="table-column">
      <style:table-column-properties style:column-width="2.554cm" style:rel-column-width="9848*"/>
    </style:style>
    <style:style style:name="Table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097cm" style:rel-column-width="8085*"/>
    </style:style>
    <style:style style:name="Table2.B" style:family="table-column">
      <style:table-column-properties style:column-width="14.901cm" style:rel-column-width="57450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fo:font-size="14pt" fo:font-weight="bold" fo:background-color="transparent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  <style:text-properties fo:color="#ff0000" loext:opacity="100%"/>
    </style:style>
    <style:style style:name="P10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Frame_20_contents">
      <style:paragraph-properties fo:text-align="start" style:justify-single-word="false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ge-content" style:horizontal-pos="left" style:horizontal-rel="page-content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graphics1" text:anchor-type="page" text:anchor-page-number="1" svg:y="0cm" svg:width="4.87cm" svg:height="3.941cm" draw:z-index="0">
        <draw:image xlink:href="Pictures/10000001000000E6000000BA60214A4E.png" xlink:type="simple" xlink:show="embed" xlink:actuate="onLoad" draw:mime-type="image/png"/>
      </draw:frame>
      <text:p text:style-name="P1"/>
      <text:p text:style-name="P1"/>
      <text:p text:style-name="P1"><text:a xlink:type="simple" xlink:href="relatorio://o.customer.name" text:style-name="Internet_20_link" text:visited-style-name="Visited_20_Internet_20_Link">o.customer.name</text:a></text:p>
      <text:p text:style-name="P1"><text:a xlink:type="simple" xlink:href="relatorio://o.customer.address.street" text:style-name="Internet_20_link" text:visited-style-name="Visited_20_Internet_20_Link">o.customer.address.street</text:a></text:p>
      <text:p text:style-name="P1"><text:a xlink:type="simple" xlink:href="relatorio://o.customer.address.zip" text:style-name="Internet_20_link" text:visited-style-name="Visited_20_Internet_20_Link">o.customer.address.zip</text:a> <text:a xlink:type="simple" xlink:href="relatorio://o.customer.address.city" text:style-name="Internet_20_link" text:visited-style-name="Visited_20_Internet_20_Link">o.customer.address.city</text:a></text:p>
      <text:p text:style-name="P1"/>
      <text:p text:style-name="P1"/>
      <text:p text:style-name="P1"/>
      <text:p text:style-name="P1"/>
      <text:p text:style-name="P1"/>
      <text:p text:style-name="P2">Invoice #<text:a xlink:type="simple" xlink:href="relatorio://o.id" text:style-name="Internet_20_link" text:visited-style-name="Visited_20_Internet_20_Link">o.id</text:a></text:p>
      <text:p text:style-name="P3"/>
      <text:p text:style-name="P4"><text:a xlink:type="simple" xlink:href="relatorio://if%20test=%22o.status=='late'%22" text:style-name="Internet_20_link" text:visited-style-name="Visited_20_Internet_20_Link">if test="o.status=='late'"</text:a></text:p>
      <text:p text:style-name="P4">This is the last reminder before we swarm you with our mighty lawyers.</text:p>
      <text:p text:style-name="P4"><text:a xlink:type="simple" xlink:href="relatorio:///if" text:style-name="Internet_20_link" text:visited-style-name="Visited_20_Internet_20_Link">/if</text:a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5">Article</text:p>
            </table:table-cell>
            <table:table-cell table:style-name="Table1.A1" office:value-type="string">
              <text:p text:style-name="P5">Ref</text:p>
            </table:table-cell>
            <table:table-cell table:style-name="Table1.A1" office:value-type="string">
              <text:p text:style-name="P5">Qty</text:p>
            </table:table-cell>
            <table:table-cell table:style-name="Table1.A1" office:value-type="string">
              <text:p text:style-name="P5">Unit Price</text:p>
            </table:table-cell>
            <table:table-cell table:style-name="Table1.E1" office:value-type="string">
              <text:p text:style-name="P5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6"><text:a xlink:type="simple" xlink:href="relatorio://for%20each=%22line%20in%20o.lines%22" text:style-name="Internet_20_link" text:visited-style-name="Visited_20_Internet_20_Link">for each="line in o.lines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a xlink:type="simple" xlink:href="relatorio://choose%20test=%22%22" text:style-name="Internet_20_link" text:visited-style-name="Visited_20_Internet_20_Link">choose test="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a xlink:type="simple" xlink:href="relatorio://when%20test=%22line.amount%3E=0%22" text:style-name="Internet_20_link" text:visited-style-name="Visited_20_Internet_20_Link">when test="line.amount&gt;=0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7"><text:a xlink:type="simple" xlink:href="relatorio://line.item.name" text:style-name="Internet_20_link" text:visited-style-name="Visited_20_Internet_20_Link">line.item.name</text:a></text:p>
          </table:table-cell>
          <table:table-cell table:style-name="Table1.B5" office:value-type="string">
            <text:p text:style-name="P6"><text:a xlink:type="simple" xlink:href="relatorio://line.item.reference" text:style-name="Internet_20_link" text:visited-style-name="Visited_20_Internet_20_Link">line.item.reference</text:a></text:p>
          </table:table-cell>
          <table:table-cell table:style-name="Table1.C5" office:value-type="string">
            <text:p text:style-name="P6"><text:a xlink:type="simple" xlink:href="relatorio://line.quantity" text:style-name="Internet_20_link" text:visited-style-name="Visited_20_Internet_20_Link">line.quantity</text:a></text:p>
          </table:table-cell>
          <table:table-cell table:style-name="Table1.D5" office:value-type="string">
            <text:p text:style-name="P6"><text:a xlink:type="simple" xlink:href="relatorio://line.item.price" text:style-name="Internet_20_link" text:visited-style-name="Visited_20_Internet_20_Link">line.item.price</text:a></text:p>
          </table:table-cell>
          <table:table-cell table:style-name="Table1.E5" office:value-type="string">
            <text:p text:style-name="P8"><text:a xlink:type="simple" xlink:href="relatorio://line.amount" text:style-name="Internet_20_link" text:visited-style-name="Visited_20_Internet_20_Link">line.amount</text:a></text:p>
          </table:table-cell>
        </table:table-row>
        <table:table-row>
          <table:table-cell table:style-name="Table1.A2" table:number-columns-spanned="5" office:value-type="string">
            <text:p text:style-name="P7"><text:a xlink:type="simple" xlink:href="relatorio:///when" text:style-name="Internet_20_link" text:visited-style-name="Visited_20_Internet_20_Link">/when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a xlink:type="simple" xlink:href="relatorio://otherwise%20test=%22%22" text:style-name="Internet_20_link" text:visited-style-name="Visited_20_Internet_20_Link">otherwise test="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7"><text:a xlink:type="simple" xlink:href="relatorio://line.item.name" text:style-name="Internet_20_link" text:visited-style-name="Visited_20_Internet_20_Link">line.item.name</text:a></text:p>
          </table:table-cell>
          <table:table-cell table:style-name="Table1.B5" office:value-type="string">
            <text:p text:style-name="P6"><text:a xlink:type="simple" xlink:href="relatorio://line.item.reference" text:style-name="Internet_20_link" text:visited-style-name="Visited_20_Internet_20_Link">line.item.reference</text:a></text:p>
          </table:table-cell>
          <table:table-cell table:style-name="Table1.C5" office:value-type="string">
            <text:p text:style-name="P6"><text:a xlink:type="simple" xlink:href="relatorio://line.quantity" text:style-name="Internet_20_link" text:visited-style-name="Visited_20_Internet_20_Link">line.quantity</text:a></text:p>
          </table:table-cell>
          <table:table-cell table:style-name="Table1.D5" office:value-type="string">
            <text:p text:style-name="P6"><text:a xlink:type="simple" xlink:href="relatorio://line.item.price" text:style-name="Internet_20_link" text:visited-style-name="Visited_20_Internet_20_Link">line.item.price</text:a></text:p>
          </table:table-cell>
          <table:table-cell table:style-name="Table1.E8" office:value-type="string">
            <text:p text:style-name="P9"><text:a xlink:type="simple" xlink:href="relatorio://line.amount" text:style-name="Internet_20_link" text:visited-style-name="Visited_20_Internet_20_Link">line.amount</text:a></text:p>
          </table:table-cell>
        </table:table-row>
        <table:table-row>
          <table:table-cell table:style-name="Table1.A2" table:number-columns-spanned="5" office:value-type="string">
            <text:p text:style-name="P7"><text:a xlink:type="simple" xlink:href="relatorio:///otherwise" text:style-name="Internet_20_link" text:visited-style-name="Visited_20_Internet_20_Link">/otherwise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a xlink:type="simple" xlink:href="relatorio:///choose" text:style-name="Internet_20_link" text:visited-style-name="Visited_20_Internet_20_Link">/choose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6"><text:a xlink:type="simple" xlink:href="relatori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4" office:value-type="string">
            <text:p text:style-name="P8">Subtotal</text:p>
          </table:table-cell>
          <table:covered-table-cell/>
          <table:covered-table-cell/>
          <table:covered-table-cell/>
          <table:table-cell table:style-name="Table1.E12" office:value-type="string">
            <text:p text:style-name="P8"><text:a xlink:type="simple" xlink:href="relatorio://o.total" text:style-name="Internet_20_link" text:visited-style-name="Visited_20_Internet_20_Link">o.total</text:a></text:p>
          </table:table-cell>
        </table:table-row>
        <table:table-row>
          <table:table-cell table:style-name="Table1.A12" table:number-columns-spanned="4" office:value-type="string">
            <text:p text:style-name="P8">VAT</text:p>
          </table:table-cell>
          <table:covered-table-cell/>
          <table:covered-table-cell/>
          <table:covered-table-cell/>
          <table:table-cell table:style-name="Table1.E13" office:value-type="string">
            <text:p text:style-name="P8"><text:a xlink:type="simple" xlink:href="relatorio://o.vat" text:style-name="Internet_20_link" text:visited-style-name="Visited_20_Internet_20_Link">o.vat</text:a></text:p>
          </table:table-cell>
        </table:table-row>
        <table:table-row>
          <table:table-cell table:style-name="Table1.A12" table:number-columns-spanned="4" office:value-type="string">
            <text:p text:style-name="P10">Total</text:p>
          </table:table-cell>
          <table:covered-table-cell/>
          <table:covered-table-cell/>
          <table:covered-table-cell/>
          <table:table-cell table:style-name="Table1.E14" office:value-type="string">
            <text:p text:style-name="P11"><text:a xlink:type="simple" xlink:href="relatorio://o.vat%20+%20o.total" text:style-name="Internet_20_link" text:visited-style-name="Visited_20_Internet_20_Link">o.vat + o.total</text:a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draw:frame draw:style-name="fr1" draw:name="image: o.bottle" text:anchor-type="char" svg:height="1.93cm" draw:z-index="1"><draw:text-box fo:min-width="1.155cm"><text:p text:style-name="P12"/></draw:text-box></draw:frame></text:p>
          </table:table-cell>
          <table:table-cell table:style-name="Table2.A1" office:value-type="string">
            <text:p text:style-name="P6">Your sale repartition:</text:p>
            <text:p text:style-name="P6"/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Bitstream Vera Sans" fo:font-size="12pt" fo:language="en" fo:country="US" style:letter-kerning="true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fo:color="#000000" loext:opacity="100%" style:font-name="Bitstream Vera Sans" fo:font-size="12pt" fo:language="en" fo:country="US" style:letter-kerning="true" style:font-name-asian="Bitstream Vera Sans1" style:font-size-asian="12pt" style:language-asian="en" style:country-asian="US" style:font-name-complex="Bitstream Vera Sans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Bitstream Vera Sans1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page-count="1" meta:table-count="2" meta:image-count="1" meta:object-count="0" meta:paragraph-count="38" meta:word-count="64" meta:character-count="548"/>
  </office:meta>
</office:document-meta>
</file>